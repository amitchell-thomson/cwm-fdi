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D000003E15633563F.png" manifest:media-type="image/png"/>
  <manifest:file-entry manifest:full-path="Pictures/10000001000003990000013D16FC55DD.png" manifest:media-type="image/png"/>
  <manifest:file-entry manifest:full-path="Pictures/10000001000003990000013D0B58BD70.png" manifest:media-type="image/png"/>
  <manifest:file-entry manifest:full-path="Pictures/10000001000003110000016797E2E251.png" manifest:media-type="image/png"/>
  <manifest:file-entry manifest:full-path="Pictures/10000001000001A400000075EC5D51BF.png" manifest:media-type="image/png"/>
  <manifest:file-entry manifest:full-path="Pictures/1000000100000207000000544A650C95.png" manifest:media-type="image/png"/>
  <manifest:file-entry manifest:full-path="Pictures/10000001000003540000017C076D30AF.png" manifest:media-type="image/png"/>
  <manifest:file-entry manifest:full-path="Pictures/10000001000001F100000135B121DC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6f144" officeooo:paragraph-rsid="0006f144" style:font-weight-asian="bold" style:font-weight-complex="bold"/>
    </style:style>
    <style:style style:name="P2" style:family="paragraph" style:parent-style-name="Standard">
      <style:paragraph-properties fo:break-before="page"/>
      <style:text-properties fo:font-weight="bold" officeooo:rsid="0006f144" officeooo:paragraph-rsid="0006f144" style:font-weight-asian="bold" style:font-weight-complex="bold"/>
    </style:style>
    <style:style style:name="P3" style:family="paragraph" style:parent-style-name="Standard">
      <style:text-properties fo:font-weight="bold" officeooo:rsid="00092b0e" officeooo:paragraph-rsid="00092b0e" style:font-weight-asian="bold" style:font-weight-complex="bold"/>
    </style:style>
    <style:style style:name="P4" style:family="paragraph" style:parent-style-name="Standard">
      <style:text-properties fo:font-weight="normal" officeooo:rsid="0006f144" officeooo:paragraph-rsid="0006f144" style:font-weight-asian="normal" style:font-weight-complex="normal"/>
    </style:style>
    <style:style style:name="P5" style:family="paragraph" style:parent-style-name="Standard">
      <style:text-properties fo:font-weight="normal" officeooo:rsid="000874bc" officeooo:paragraph-rsid="000874bc" style:font-weight-asian="normal" style:font-weight-complex="normal"/>
    </style:style>
    <style:style style:name="P6" style:family="paragraph" style:parent-style-name="Standard">
      <style:paragraph-properties fo:break-before="page"/>
      <style:text-properties fo:font-weight="normal" officeooo:rsid="00092b0e" officeooo:paragraph-rsid="00092b0e" style:font-weight-asian="normal" style:font-weight-complex="normal"/>
    </style:style>
    <style:style style:name="P7" style:family="paragraph" style:parent-style-name="Standard">
      <style:text-properties fo:font-weight="normal" officeooo:rsid="00092b0e" officeooo:paragraph-rsid="00092b0e" style:font-weight-asian="normal" style:font-weight-complex="normal"/>
    </style:style>
    <style:style style:name="P8" style:family="paragraph" style:parent-style-name="Standard">
      <style:text-properties fo:font-weight="normal" officeooo:rsid="0009ce14" officeooo:paragraph-rsid="0009ce14" style:font-weight-asian="normal" style:font-weight-complex="normal"/>
    </style:style>
    <style:style style:name="P9" style:family="paragraph" style:parent-style-name="Standard">
      <style:paragraph-properties fo:break-before="page"/>
      <style:text-properties fo:font-weight="normal" officeooo:rsid="0009ce14" officeooo:paragraph-rsid="0009ce1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5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ple Measurements – Idleness</text:p>
      <text:p text:style-name="P4">1.</text:p>
      <text:p text:style-name="P4"><draw:frame draw:style-name="fr1" draw:name="Image1" text:anchor-type="char" svg:x="0.0236in" svg:y="0.0319in" svg:width="5.1772in" svg:height="3.2189in" draw:z-index="0"><draw:image xlink:href="Pictures/10000001000001F100000135B121DC32.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op CPU users are firefox and gnome-shell (core GUI for linux environment), which makes sense as they are the most complex applications running currently.</text:p>
      <text:p text:style-name="P4"/>
      <text:p text:style-name="P4">To become a top user we would need to open more firefox tabs (consume more RAM) or, switch screens quickly to put load on the GUI interface.</text:p>
      <text:p text:style-name="P4"/>
      <text:p text:style-name="P4">2.</text:p>
      <text:p text:style-name="P4"><draw:frame draw:style-name="fr1" draw:name="Image2" text:anchor-type="char" svg:x="0.0283in" svg:y="0.052in" svg:width="4.3752in" svg:height="1.2189in" draw:z-index="1"><draw:image xlink:href="Pictures/10000001000001A400000075EC5D51BF.png" xlink:type="simple" xlink:show="embed" xlink:actuate="onLoad" draw:mime-type="image/png"/></draw:frame></text:p>
      <text:p text:style-name="P4"/>
      <text:p text:style-name="P4"/>
      <text:p text:style-name="P4"/>
      <text:p text:style-name="P4"/>
      <text:p text:style-name="P4"/>
      <text:p text:style-name="P4"/>
      <text:p text:style-name="P4">The CPU appears to never be idle as there are always background processes running even just to keep the screen on, or to be listening for keyboard inputs, or mouse clicks, or any other possible input/ change like wifi connection/ USB drive status. From the program list we can see that even when nothing is happening there are hundreds of programmes still running.</text:p>
      <text:p text:style-name="P2">Resource Usage – Compute Power, Energy and Thermals</text:p>
      <text:p text:style-name="P1"><draw:frame draw:style-name="fr1" draw:name="Image3" text:anchor-type="char" svg:x="0in" svg:y="0.0291in" svg:width="6.6929in" svg:height="3.0602in" draw:z-index="2"><draw:image xlink:href="Pictures/10000001000003110000016797E2E251.png" xlink:type="simple" xlink:show="embed" xlink:actuate="onLoad" draw:mime-type="image/png"/></draw:frame></text:p>
      <text:p text:style-name="P1"><draw:frame draw:style-name="fr3" draw:name="Image4" text:anchor-type="char" svg:width="6.6929in" svg:height="2.9846in" draw:z-index="3"><draw:image xlink:href="Pictures/10000001000003540000017C076D30AF.png" xlink:type="simple" xlink:show="embed" xlink:actuate="onLoad" draw:mime-type="image/png"/></draw:frame></text:p>
      <text:p text:style-name="P5">3. The baseline very much fluctuates over time, as the OS is continuously reallocating resources to whatever it feels requires them at that instant. Most interestingly, we see spikes whenever I switched windows the firefox/ libreoffice writer window (resource intensive), away from the terminals window (not resource intensive). This is likely the OS reallocating resources to the windows that need it to improve efficiency, ie. so that we are not running firefox at full capacity when we cannot even see it.</text:p>
      <text:p text:style-name="P5"/>
      <text:p text:style-name="P5">4.</text:p>
      <text:p text:style-name="P5">a) <draw:frame draw:style-name="fr1" draw:name="Image5" text:anchor-type="char" svg:x="0.0201in" svg:y="0.2374in" svg:width="5.5402in" svg:height="1.9071in" draw:z-index="4"><draw:image xlink:href="Pictures/10000001000003990000013D0B58BD70.png" xlink:type="simple" xlink:show="embed" xlink:actuate="onLoad" draw:mime-type="image/png"/></draw:frame></text:p>
      <text:p text:style-name="P6">b) the business metric compares pretty well, as we can see the idle % sitting at around 1%, matching the %CPU measurement in the diagram using btop from Q2 (sat at around 1-2%).</text:p>
      <text:p text:style-name="P7"><text:line-break/>this tool shows more clearly how idleness varies over time, which the other tools htop/btop/ps aux make it harder to see. </text:p>
      <text:p text:style-name="P7"/>
      <text:p text:style-name="P7"/>
      <text:p text:style-name="P7">5.</text:p>
      <text:p text:style-name="P7"><draw:frame draw:style-name="fr1" draw:name="Image6" text:anchor-type="char" svg:x="0in" svg:y="0.0429in" svg:width="6.6929in" svg:height="2.3035in" draw:z-index="5"><draw:image xlink:href="Pictures/10000001000003990000013D16FC55DD.png" xlink:type="simple" xlink:show="embed" xlink:actuate="onLoad" draw:mime-type="image/png"/></draw:frame></text:p>
      <text:p text:style-name="P3">The Impact of Invoking New Commands</text:p>
      <text:p text:style-name="P7">6.</text:p>
      <text:p text:style-name="P8">a)</text:p>
      <text:p text:style-name="P8"><draw:frame draw:style-name="fr2" draw:name="Image7" text:anchor-type="char" svg:x="-0.4201in" svg:y="0.0193in" svg:width="7.5339in" svg:height="3.9457in" draw:z-index="6"><draw:image xlink:href="Pictures/100000010000077D000003E15633563F.png" xlink:type="simple" xlink:show="embed" xlink:actuate="onLoad" draw:mime-type="image/png"/></draw:frame></text:p>
      <text:p text:style-name="P8">we can see the CPU usage % spiking massively to almost 100%, and we can see the power usage jumping up to 31W nearly<draw:frame draw:style-name="fr1" draw:name="Image8" text:anchor-type="char" svg:x="1.9437in" svg:y="0.2661in" svg:width="5.0689in" svg:height="0.8201in" draw:z-index="7"><draw:image xlink:href="Pictures/1000000100000207000000544A650C95.png" xlink:type="simple" xlink:show="embed" xlink:actuate="onLoad" draw:mime-type="image/png"/></draw:frame></text:p>
      <text:p text:style-name="P8"/>
      <text:p text:style-name="P9">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9T15:39:53.143115770</meta:creation-date>
    <meta:generator>LibreOffice/24.2.7.2$Linux_X86_64 LibreOffice_project/420$Build-2</meta:generator>
    <dc:date>2026-06-09T16:31:05.568862528</dc:date>
    <meta:editing-duration>PT14M13S</meta:editing-duration>
    <meta:editing-cycles>2</meta:editing-cycles>
    <meta:document-statistic meta:table-count="0" meta:image-count="8" meta:object-count="0" meta:page-count="4" meta:paragraph-count="18" meta:word-count="297" meta:character-count="1715" meta:non-whitespace-character-count="1431"/>
  </office:meta>
</office:document-meta>
</file>