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7D000003F0E249353A.png" manifest:media-type="image/png"/>
  <manifest:file-entry manifest:full-path="Pictures/100000010000057D000003F013BB50ED.png" manifest:media-type="image/png"/>
  <manifest:file-entry manifest:full-path="Pictures/100000010000025A000001C55DDCF112.png" manifest:media-type="image/png"/>
  <manifest:file-entry manifest:full-path="Pictures/100000010000026A000001D3F2BA764C.png" manifest:media-type="image/png"/>
  <manifest:file-entry manifest:full-path="Pictures/10000001000002EB0000004C7C9273A0.png" manifest:media-type="image/png"/>
  <manifest:file-entry manifest:full-path="Pictures/10000001000002EB000001697D628540.png" manifest:media-type="image/png"/>
  <manifest:file-entry manifest:full-path="Pictures/1000000100000319000002B17D2CC51F.png" manifest:media-type="image/png"/>
  <manifest:file-entry manifest:full-path="Pictures/10000001000002EB00000169AAE9C407.png" manifest:media-type="image/png"/>
  <manifest:file-entry manifest:full-path="Pictures/1000000100000368000001D7427963CB.png" manifest:media-type="image/png"/>
  <manifest:file-entry manifest:full-path="Pictures/1000000100000319000002B1096D5DCF.png" manifest:media-type="image/png"/>
  <manifest:file-entry manifest:full-path="Pictures/100000010000025A000001C512787A07.png" manifest:media-type="image/png"/>
  <manifest:file-entry manifest:full-path="Pictures/100000010000057D000003F0C950AB58.png" manifest:media-type="image/png"/>
  <manifest:file-entry manifest:full-path="Pictures/10000001000002950000008819E14CA0.png" manifest:media-type="image/png"/>
  <manifest:file-entry manifest:full-path="Pictures/100000010000029500000088D3201C39.png" manifest:media-type="image/png"/>
  <manifest:file-entry manifest:full-path="Pictures/10000001000002EB0000004CD189F740.png" manifest:media-type="image/png"/>
  <manifest:file-entry manifest:full-path="Pictures/1000000100000294000001694E6F22EA.png" manifest:media-type="image/png"/>
  <manifest:file-entry manifest:full-path="Pictures/10000001000002EB00000169501E92F9.png" manifest:media-type="image/png"/>
  <manifest:file-entry manifest:full-path="Pictures/10000001000002EB00000169CC9C4E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2b07f" officeooo:paragraph-rsid="0012b07f" style:font-weight-asian="bold" style:font-weight-complex="bold"/>
    </style:style>
    <style:style style:name="P2" style:family="paragraph" style:parent-style-name="Standard">
      <style:paragraph-properties fo:break-before="page"/>
      <style:text-properties fo:font-weight="bold" officeooo:rsid="0025bf85" officeooo:paragraph-rsid="0025bf85" style:font-weight-asian="bold" style:font-weight-complex="bold"/>
    </style:style>
    <style:style style:name="P3" style:family="paragraph" style:parent-style-name="Standard">
      <style:text-properties fo:font-weight="bold" officeooo:rsid="0025bf85" officeooo:paragraph-rsid="0025bf85" style:font-weight-asian="bold" style:font-weight-complex="bold"/>
    </style:style>
    <style:style style:name="P4" style:family="paragraph" style:parent-style-name="Standard">
      <style:text-properties fo:font-weight="normal" officeooo:rsid="0012b07f" officeooo:paragraph-rsid="0012b07f" style:font-weight-asian="normal" style:font-weight-complex="normal"/>
    </style:style>
    <style:style style:name="P5" style:family="paragraph" style:parent-style-name="Standard">
      <style:paragraph-properties fo:break-before="page"/>
      <style:text-properties fo:font-weight="normal" officeooo:rsid="0014e15a" officeooo:paragraph-rsid="0014e15a" style:font-weight-asian="normal" style:font-weight-complex="normal"/>
    </style:style>
    <style:style style:name="P6" style:family="paragraph" style:parent-style-name="Standard">
      <style:text-properties fo:font-weight="normal" officeooo:rsid="0014e15a" officeooo:paragraph-rsid="0014e15a" style:font-weight-asian="normal" style:font-weight-complex="normal"/>
    </style:style>
    <style:style style:name="P7" style:family="paragraph" style:parent-style-name="Standard">
      <style:text-properties fo:font-weight="normal" officeooo:rsid="001628b3" officeooo:paragraph-rsid="001628b3" style:font-weight-asian="normal" style:font-weight-complex="normal"/>
    </style:style>
    <style:style style:name="P8" style:family="paragraph" style:parent-style-name="Standard">
      <style:paragraph-properties fo:break-before="page"/>
      <style:text-properties fo:font-weight="normal" officeooo:rsid="001628b3" officeooo:paragraph-rsid="001628b3" style:font-weight-asian="normal" style:font-weight-complex="normal"/>
    </style:style>
    <style:style style:name="P9" style:family="paragraph" style:parent-style-name="Standard">
      <style:text-properties fo:font-weight="normal" officeooo:rsid="001910f8" officeooo:paragraph-rsid="001910f8" style:font-weight-asian="normal" style:font-weight-complex="normal"/>
    </style:style>
    <style:style style:name="P10" style:family="paragraph" style:parent-style-name="Standard">
      <style:text-properties fo:font-weight="normal" officeooo:rsid="001b62de" officeooo:paragraph-rsid="001b62de" style:font-weight-asian="normal" style:font-weight-complex="normal"/>
    </style:style>
    <style:style style:name="P11" style:family="paragraph" style:parent-style-name="Standard">
      <style:text-properties fo:font-weight="normal" officeooo:rsid="001be690" officeooo:paragraph-rsid="001be690" style:font-weight-asian="normal" style:font-weight-complex="normal"/>
    </style:style>
    <style:style style:name="P12" style:family="paragraph" style:parent-style-name="Standard">
      <style:text-properties fo:font-weight="normal" officeooo:rsid="001beba5" officeooo:paragraph-rsid="001beba5" style:font-weight-asian="normal" style:font-weight-complex="normal"/>
    </style:style>
    <style:style style:name="P13" style:family="paragraph" style:parent-style-name="Standard">
      <style:paragraph-properties fo:break-before="page"/>
      <style:text-properties fo:font-weight="normal" officeooo:rsid="001beba5" officeooo:paragraph-rsid="001beba5" style:font-weight-asian="normal" style:font-weight-complex="normal"/>
    </style:style>
    <style:style style:name="P14" style:family="paragraph" style:parent-style-name="Standard">
      <style:text-properties fo:font-weight="normal" officeooo:rsid="001f8b94" officeooo:paragraph-rsid="001f8b94" style:font-weight-asian="normal" style:font-weight-complex="normal"/>
    </style:style>
    <style:style style:name="P15" style:family="paragraph" style:parent-style-name="Standard">
      <style:text-properties fo:font-weight="normal" officeooo:rsid="00215d80" officeooo:paragraph-rsid="00215d80" style:font-weight-asian="normal" style:font-weight-complex="normal"/>
    </style:style>
    <style:style style:name="P16" style:family="paragraph" style:parent-style-name="Standard">
      <style:text-properties fo:font-weight="normal" officeooo:rsid="0022a9dc" officeooo:paragraph-rsid="0022a9dc" style:font-weight-asian="normal" style:font-weight-complex="normal"/>
    </style:style>
    <style:style style:name="P17" style:family="paragraph" style:parent-style-name="Standard">
      <style:text-properties fo:font-weight="normal" officeooo:rsid="0022afb9" officeooo:paragraph-rsid="0022afb9" style:font-weight-asian="normal" style:font-weight-complex="normal"/>
    </style:style>
    <style:style style:name="P18" style:family="paragraph" style:parent-style-name="Standard">
      <style:text-properties fo:font-weight="normal" officeooo:rsid="0023ea53" officeooo:paragraph-rsid="0023ea53" style:font-weight-asian="normal" style:font-weight-complex="normal"/>
    </style:style>
    <style:style style:name="P19" style:family="paragraph" style:parent-style-name="Standard">
      <style:text-properties fo:font-weight="normal" officeooo:rsid="0023ea53" officeooo:paragraph-rsid="0025bf85" style:font-weight-asian="normal" style:font-weight-complex="normal"/>
    </style:style>
    <style:style style:name="P20" style:family="paragraph" style:parent-style-name="Standard">
      <style:text-properties fo:font-weight="normal" officeooo:rsid="0025bf85" officeooo:paragraph-rsid="0025bf85" style:font-weight-asian="normal" style:font-weight-complex="normal"/>
    </style:style>
    <style:style style:name="T1" style:family="text">
      <style:text-properties officeooo:rsid="00166adf"/>
    </style:style>
    <style:style style:name="T2" style:family="text">
      <style:text-properties officeooo:rsid="0019be5c"/>
    </style:style>
    <style:style style:name="T3" style:family="text">
      <style:text-properties officeooo:rsid="001b62de"/>
    </style:style>
    <style:style style:name="T4" style:family="text">
      <style:text-properties officeooo:rsid="001be690"/>
    </style:style>
    <style:style style:name="T5" style:family="text">
      <style:text-properties officeooo:rsid="001beba5"/>
    </style:style>
    <style:style style:name="T6" style:family="text">
      <style:text-properties officeooo:rsid="00215d80"/>
    </style:style>
    <style:style style:name="T7" style:family="text">
      <style:text-properties officeooo:rsid="0025bf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Timestamp Counter</text:p>
      <text:p text:style-name="P4"/>
      <text:p text:style-name="P4">1.</text:p>
      <text:p text:style-name="P4"><draw:frame draw:style-name="fr1" draw:name="Image1" text:anchor-type="char" svg:x="0in" svg:y="0.0528in" svg:width="6.6929in" svg:height="3.6146in" draw:z-index="0"><draw:image xlink:href="Pictures/1000000100000368000001D7427963CB.png" xlink:type="simple" xlink:show="embed" xlink:actuate="onLoad" draw:mime-type="image/png"/></draw:frame></text:p>
      <text:p text:style-name="P4">time gap between consecutive reads sits at around 15000ns (15 microseconds) across a range of around 2 nanoseconds</text:p>
      <text:p text:style-name="P4"/>
      <text:p text:style-name="P4">2.</text:p>
      <text:p text:style-name="P4"><draw:frame draw:style-name="fr1" draw:name="Image2" text:anchor-type="char" svg:x="0.0181in" svg:y="0.0547in" svg:width="5.5362in" svg:height="4.1839in" draw:z-index="1"><draw:image xlink:href="Pictures/100000010000026A000001D3F2BA764C.png" xlink:type="simple" xlink:show="embed" xlink:actuate="onLoad" draw:mime-type="image/png"/></draw:frame></text:p>
      <text:p text:style-name="P4"/>
      <text:p text:style-name="P5">3.</text:p>
      <text:p text:style-name="P6"><draw:frame draw:style-name="fr1" draw:name="Image3" text:anchor-type="char" svg:x="0.0398in" svg:y="0.0335in" svg:width="4.1528in" svg:height="3.6083in" draw:z-index="2"><draw:image xlink:href="Pictures/1000000100000319000002B1096D5DC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4.</text:p>
      <text:p text:style-name="P6"><draw:frame draw:style-name="fr1" draw:name="Image4" text:anchor-type="char" svg:x="0.0193in" svg:y="0.0547in" svg:width="4.2146in" svg:height="3.6618in" draw:z-index="3"><draw:image xlink:href="Pictures/1000000100000319000002B17D2CC51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erformance mode massively increased clock speed, and drastically reduced timed difference between reads.</text:p>
      <text:p text:style-name="P6"/>
      <text:p text:style-name="P5"><draw:frame draw:style-name="fr1" draw:name="Image5" text:anchor-type="char" svg:x="0.0311in" svg:y="0.278in" svg:width="4.5866in" svg:height="3.4516in" draw:z-index="4"><draw:image xlink:href="Pictures/100000010000025A000001C512787A07.png" xlink:type="simple" xlink:show="embed" xlink:actuate="onLoad" draw:mime-type="image/png"/></draw:frame>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8" text:anchor-type="char" svg:x="0in" svg:y="0.0126in" svg:width="6.6929in" svg:height="1.3772in" draw:z-index="7"><draw:image xlink:href="Pictures/10000001000002950000008819E14CA0.png" xlink:type="simple" xlink:show="embed" xlink:actuate="onLoad" draw:mime-type="image/png"/></draw:frame></text:p>
      <text:p text:style-name="P6"/>
      <text:p text:style-name="P6"/>
      <text:p text:style-name="P6">6. Now pinned to a single core</text:p>
      <text:p text:style-name="P6"><draw:frame draw:style-name="fr1" draw:name="Image6" text:anchor-type="char" svg:x="0.0098in" svg:y="0.0827in" svg:width="4.5909in" svg:height="3.4547in" draw:z-index="5"><draw:image xlink:href="Pictures/100000010000025A000001C55DDCF11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7" text:anchor-type="char" svg:x="0.252in" svg:y="0.002in" svg:width="5.6898in" svg:height="1.1709in" draw:z-index="6"><draw:image xlink:href="Pictures/100000010000029500000088D3201C39.png" xlink:type="simple" xlink:show="embed" xlink:actuate="onLoad" draw:mime-type="image/png"/></draw:frame></text:p>
      <text:p text:style-name="P9"><text:soft-page-break/>7. Looking at the two cases, pinning the program to one core vs not, we see the only real major difference is the max time taken, which is much larger (we also see a very slight mean time reduction). This could be because one core is subject to higher variance as other processes could get in the way, whereas on multiple cores the blockers are spread out so time difference is less affected by small local changes.</text:p>
      <text:p text:style-name="P9"/>
      <text:p text:style-name="P9"/>
      <text:p text:style-name="P9">8. <text:span text:style-name="T2">The mean times for the c code are much faster than the python code, but their min times are within the same order of magnitude – even close. This is an interesting result </text:span><text:span text:style-name="T3">shows the way in which python has systematic execution overhead that gives similar best case scenarios to C, but much worse general execution times. Some reasons for this in python are garbage pauses, global interpreter lock contention, interpreter overhead and less efficient machine code than C.</text:span></text:p>
      <text:p text:style-name="P9"/>
      <text:p text:style-name="P10">9. The huge difference between mean and maximum measured times come from the rare tail events that occasionally occur as the code runs. These would be things like hardware interrupts and garbage collection (mentioned above), that essentially pause the running program and cause a spike in execution time for that iteration.</text:p>
      <text:p text:style-name="P2">Ping Measurement</text:p>
      <text:p text:style-name="P10">10.</text:p>
      <text:p text:style-name="P10"><draw:frame draw:style-name="fr1" draw:name="Image9" text:anchor-type="char" svg:x="0in" svg:y="0.0457in" svg:width="5.3854in" svg:height="2.9453in" draw:z-index="8"><draw:image xlink:href="Pictures/1000000100000294000001694E6F22E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11.</text:p>
      <text:p text:style-name="P11">Oxford</text:p>
      <text:p text:style-name="P11"><draw:frame draw:style-name="fr1" draw:name="Image10" text:anchor-type="char" svg:x="0.0228in" svg:y="0.0618in" svg:width="5.9354in" svg:height="2.8681in" draw:z-index="9"><draw:image xlink:href="Pictures/10000001000002EB00000169501E92F9.png" xlink:type="simple" xlink:show="embed" xlink:actuate="onLoad" draw:mime-type="image/png"/></draw:frame></text:p>
      <text:p text:style-name="P11">Stanford</text:p>
      <text:p text:style-name="P11"><draw:frame draw:style-name="fr1" draw:name="Image11" text:anchor-type="char" svg:x="0.0398in" svg:y="0.0134in" svg:width="5.9016in" svg:height="2.8516in" draw:z-index="10"><draw:image xlink:href="Pictures/10000001000002EB00000169AAE9C407.png" xlink:type="simple" xlink:show="embed" xlink:actuate="onLoad" draw:mime-type="image/png"/></draw:frame></text:p>
      <text:p text:style-name="P8"><text:span text:style-name="T1"><text:line-break/></text:span><text:span text:style-name="T4">University of Singapore</text:span></text:p>
      <text:p text:style-name="P7"><draw:frame draw:style-name="fr1" draw:name="Image12" text:anchor-type="char" svg:x="0.0335in" svg:y="0in" svg:width="5.9709in" svg:height="2.8854in" draw:z-index="11"><draw:image xlink:href="Pictures/10000001000002EB000001697D628540.png" xlink:type="simple" xlink:show="embed" xlink:actuate="onLoad" draw:mime-type="image/png"/></draw:frame></text:p>
      <text:p text:style-name="P7"/>
      <text:p text:style-name="P11">12. Lab machine to itself <text:span text:style-name="T5">10 times</text:span></text:p>
      <text:p text:style-name="P11"><draw:frame draw:style-name="fr1" draw:name="Image13" text:anchor-type="char" svg:x="0.0138in" svg:y="0in" svg:width="5.9508in" svg:height="2.8756in" draw:z-index="12"><draw:image xlink:href="Pictures/10000001000002EB00000169CC9C4E73.png" xlink:type="simple" xlink:show="embed" xlink:actuate="onLoad" draw:mime-type="image/png"/></draw:frame></text:p>
      <text:p text:style-name="P12"/>
      <text:p text:style-name="P13">13. Lab machine to itself 100 times at 0.01s interval</text:p>
      <text:p text:style-name="P12"><draw:frame draw:style-name="fr1" draw:name="Image14" text:anchor-type="char" svg:x="0in" svg:y="0.0264in" svg:width="6.6929in" svg:height="0.6807in" draw:z-index="13"><draw:image xlink:href="Pictures/10000001000002EB0000004CD189F740.png" xlink:type="simple" xlink:show="embed" xlink:actuate="onLoad" draw:mime-type="image/png"/></draw:frame></text:p>
      <text:p text:style-name="P14">min and max are separated by 0.04<text:span text:style-name="T6">0</text:span>ms, <text:span text:style-name="T6">more than twice the mean value so this is a large range. The large max will be noise from context switches where the kernel temporarily schedules other tasks other than the ping command while it is running.</text:span></text:p>
      <text:p text:style-name="P14"/>
      <text:p text:style-name="P15">14. Lab machine to itself 10,000 times using flooding (-f)</text:p>
      <text:p text:style-name="P15"><draw:frame draw:style-name="fr1" draw:name="Image15" text:anchor-type="char" svg:x="0in" svg:y="0.0425in" svg:width="6.6929in" svg:height="0.6807in" draw:z-index="14"><draw:image xlink:href="Pictures/10000001000002EB0000004C7C9273A0.png" xlink:type="simple" xlink:show="embed" xlink:actuate="onLoad" draw:mime-type="image/png"/></draw:frame></text:p>
      <text:p text:style-name="P15"/>
      <text:p text:style-name="P15"/>
      <text:p text:style-name="P16">15. CDF’s of round trip times for different intervals</text:p>
      <text:p text:style-name="P16"><draw:frame draw:style-name="fr1" draw:name="Image16" text:anchor-type="char" svg:x="0.0327in" svg:y="0.0693in" svg:width="3.811in" svg:height="2.7339in" draw:z-index="15"><draw:image xlink:href="Pictures/100000010000057D000003F013BB50ED.png" xlink:type="simple" xlink:show="embed" xlink:actuate="onLoad" draw:mime-type="image/png"/></draw:frame><draw:frame draw:style-name="fr1" draw:name="Image17" text:anchor-type="char" svg:x="3.6272in" svg:y="0.0693in" svg:width="3.8382in" svg:height="2.7543in" draw:z-index="16"><draw:image xlink:href="Pictures/100000010000057D000003F0E249353A.png" xlink:type="simple" xlink:show="embed" xlink:actuate="onLoad" draw:mime-type="image/png"/></draw:frame><draw:frame draw:style-name="fr1" draw:name="Image18" text:anchor-type="char" svg:x="1.7382in" svg:y="2.8925in" svg:width="4.0638in" svg:height="2.9154in" draw:z-index="17"><draw:image xlink:href="Pictures/100000010000057D000003F0C950AB5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9"><text:soft-page-break/>16.</text:p>
      <text:p text:style-name="P19">From the above we can see the pattern that longer intervals seem to longer mean/ median round trip times. This is likely due to the fact that with shorter time periods, every ping hits the L1/L2 cache so <text:span text:style-name="T7">look ups are cheap.</text:span></text:p>
      <text:p text:style-name="P18"/>
      <text:p text:style-name="P20">We can also see the shorter time period chart looks more angular as we only have a measurement precision of 3dp.</text:p>
      <text:p text:style-name="P20"/>
      <text:p text:style-name="P20">With longer intervals the pings have time to be evicted from the cache by other processes so kernel look ups are slower.</text:p>
      <text:p text:style-name="P20"/>
      <text:p text:style-name="P20"/>
      <text:p text:style-name="P3">Performance</text:p>
      <text:p text:style-name="P20">17.</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4:59:37.465559811</meta:creation-date>
    <meta:generator>LibreOffice/24.2.7.2$Linux_X86_64 LibreOffice_project/420$Build-2</meta:generator>
    <dc:date>2026-06-09T12:45:01.564743142</dc:date>
    <meta:editing-duration>PT1H9M50S</meta:editing-duration>
    <meta:editing-cycles>7</meta:editing-cycles>
    <meta:document-statistic meta:table-count="0" meta:image-count="18" meta:object-count="0" meta:page-count="8" meta:paragraph-count="29" meta:word-count="430" meta:character-count="2467" meta:non-whitespace-character-count="2064"/>
  </office:meta>
</office:document-meta>
</file>