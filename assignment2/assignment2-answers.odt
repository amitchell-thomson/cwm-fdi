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1C512787A07.png" manifest:media-type="image/png"/>
  <manifest:file-entry manifest:full-path="Pictures/1000000100000319000002B17D2CC51F.png" manifest:media-type="image/png"/>
  <manifest:file-entry manifest:full-path="Pictures/1000000100000319000002B1096D5DCF.png" manifest:media-type="image/png"/>
  <manifest:file-entry manifest:full-path="Pictures/100000010000026A000001D3F2BA764C.png" manifest:media-type="image/png"/>
  <manifest:file-entry manifest:full-path="Pictures/100000010000025A000001C55DDCF112.png" manifest:media-type="image/png"/>
  <manifest:file-entry manifest:full-path="Pictures/1000000100000368000001D7427963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b07f" officeooo:paragraph-rsid="0012b07f" style:font-weight-asian="bold" style:font-weight-complex="bold"/>
    </style:style>
    <style:style style:name="P2" style:family="paragraph" style:parent-style-name="Standard">
      <style:text-properties fo:font-weight="normal" officeooo:rsid="0012b07f" officeooo:paragraph-rsid="0012b07f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14e15a" officeooo:paragraph-rsid="0014e15a" style:font-weight-asian="normal" style:font-weight-complex="normal"/>
    </style:style>
    <style:style style:name="P4" style:family="paragraph" style:parent-style-name="Standard">
      <style:text-properties fo:font-weight="normal" officeooo:rsid="0014e15a" officeooo:paragraph-rsid="0014e15a" style:font-weight-asian="normal" style:font-weight-complex="normal"/>
    </style:style>
    <style:style style:name="P5" style:family="paragraph" style:parent-style-name="Standard">
      <style:text-properties fo:font-weight="normal" officeooo:rsid="001628b3" officeooo:paragraph-rsid="001628b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 Timestamp Counter</text:p>
      <text:p text:style-name="P2"/>
      <text:p text:style-name="P2">1.</text:p>
      <text:p text:style-name="P2"><draw:frame draw:style-name="fr1" draw:name="Image1" text:anchor-type="char" svg:x="0in" svg:y="0.0528in" svg:width="6.6929in" svg:height="3.6146in" draw:z-index="0"><draw:image xlink:href="Pictures/1000000100000368000001D7427963CB.png" xlink:type="simple" xlink:show="embed" xlink:actuate="onLoad" draw:mime-type="image/png"/></draw:frame></text:p>
      <text:p text:style-name="P2">time gap between consecutive reads sits at around 15000ns (15 microseconds) across a range of around 2 nanoseconds</text:p>
      <text:p text:style-name="P2"/>
      <text:p text:style-name="P2">2.</text:p>
      <text:p text:style-name="P2"><draw:frame draw:style-name="fr1" draw:name="Image2" text:anchor-type="char" svg:x="0.0181in" svg:y="0.0547in" svg:width="5.5362in" svg:height="4.1839in" draw:z-index="1"><draw:image xlink:href="Pictures/100000010000026A000001D3F2BA764C.png" xlink:type="simple" xlink:show="embed" xlink:actuate="onLoad" draw:mime-type="image/png"/></draw:frame></text:p>
      <text:p text:style-name="P2"/>
      <text:p text:style-name="P3">3.</text:p>
      <text:p text:style-name="P4"><draw:frame draw:style-name="fr1" draw:name="Image3" text:anchor-type="char" svg:x="0.0398in" svg:y="0.0335in" svg:width="4.1528in" svg:height="3.6083in" draw:z-index="2"><draw:image xlink:href="Pictures/1000000100000319000002B1096D5D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</text:p>
      <text:p text:style-name="P4"><draw:frame draw:style-name="fr1" draw:name="Image4" text:anchor-type="char" svg:x="0.0193in" svg:y="0.0547in" svg:width="4.2146in" svg:height="3.6618in" draw:z-index="3"><draw:image xlink:href="Pictures/1000000100000319000002B17D2CC5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erformance mode massively increased clock speed, and drastically reduced timed difference between reads.</text:p>
      <text:p text:style-name="P4"/>
      <text:p text:style-name="P3"><draw:frame draw:style-name="fr1" draw:name="Image5" text:anchor-type="char" svg:x="0.0311in" svg:y="0.278in" svg:width="4.5866in" svg:height="3.4516in" draw:z-index="4"><draw:image xlink:href="Pictures/100000010000025A000001C512787A07.png" xlink:type="simple" xlink:show="embed" xlink:actuate="onLoad" draw:mime-type="image/png"/></draw:frame>5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Now pinned to a single core</text:p>
      <text:p text:style-name="P4"><draw:frame draw:style-name="fr1" draw:name="Image6" text:anchor-type="char" svg:x="0.0098in" svg:y="0.0827in" svg:width="4.5909in" svg:height="3.4547in" draw:z-index="5"><draw:image xlink:href="Pictures/100000010000025A000001C55DDCF1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s expected, we see that the average time for a read increases when we pull read from a single core vs 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8T14:59:37.465559811</meta:creation-date>
    <meta:generator>LibreOffice/24.2.7.2$Linux_X86_64 LibreOffice_project/420$Build-2</meta:generator>
    <dc:date>2026-06-08T16:44:22.381791306</dc:date>
    <meta:editing-duration>PT4M56S</meta:editing-duration>
    <meta:editing-cycles>1</meta:editing-cycles>
    <meta:document-statistic meta:table-count="0" meta:image-count="6" meta:object-count="0" meta:page-count="3" meta:paragraph-count="10" meta:word-count="68" meta:character-count="389" meta:non-whitespace-character-count="330"/>
  </office:meta>
</office:document-meta>
</file>