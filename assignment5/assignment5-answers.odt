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3000000ADD08CE414.png" manifest:media-type="image/png"/>
  <manifest:file-entry manifest:full-path="Pictures/10000001000003A3000000D3E75DC7F2.png" manifest:media-type="image/png"/>
  <manifest:file-entry manifest:full-path="Pictures/10000001000003A3000003D1E312E9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e61b" officeooo:paragraph-rsid="0003e61b" style:font-weight-asian="bold" style:font-weight-complex="bold"/>
    </style:style>
    <style:style style:name="P2" style:family="paragraph" style:parent-style-name="Standard">
      <style:text-properties fo:font-weight="bold" officeooo:rsid="00058762" officeooo:paragraph-rsid="00058762" style:font-weight-asian="bold" style:font-weight-complex="bold"/>
    </style:style>
    <style:style style:name="P3" style:family="paragraph" style:parent-style-name="Standard">
      <style:text-properties fo:font-weight="normal" officeooo:rsid="0003e61b" officeooo:paragraph-rsid="0003e61b" style:font-weight-asian="normal" style:font-weight-complex="normal"/>
    </style:style>
    <style:style style:name="P4" style:family="paragraph" style:parent-style-name="Standard">
      <style:text-properties fo:font-weight="normal" officeooo:rsid="0004009e" officeooo:paragraph-rsid="0004009e" style:font-weight-asian="normal" style:font-weight-complex="normal"/>
    </style:style>
    <style:style style:name="P5" style:family="paragraph" style:parent-style-name="Standard">
      <style:text-properties fo:font-weight="normal" officeooo:rsid="00046615" officeooo:paragraph-rsid="00046615" style:font-weight-asian="normal" style:font-weight-complex="normal"/>
    </style:style>
    <style:style style:name="P6" style:family="paragraph" style:parent-style-name="Standard">
      <style:text-properties fo:font-weight="normal" officeooo:rsid="00047bf3" officeooo:paragraph-rsid="00047bf3" style:font-weight-asian="normal" style:font-weight-complex="normal"/>
    </style:style>
    <style:style style:name="P7" style:family="paragraph" style:parent-style-name="Standard">
      <style:text-properties fo:font-weight="normal" officeooo:rsid="00058762" officeooo:paragraph-rsid="00058762" style:font-weight-asian="normal" style:font-weight-complex="normal"/>
    </style:style>
    <style:style style:name="T1" style:family="text">
      <style:text-properties officeooo:rsid="0004009e"/>
    </style:style>
    <style:style style:name="T2" style:family="text">
      <style:text-properties officeooo:rsid="00046615"/>
    </style:style>
    <style:style style:name="T3" style:family="text">
      <style:text-properties officeooo:rsid="00047b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ving URLs using DNS</text:p>
      <text:p text:style-name="P3"/>
      <text:p text:style-name="P3">1.</text:p>
      <text:p text:style-name="P3"><draw:frame draw:style-name="fr1" draw:name="Image1" text:anchor-type="char" svg:x="0in" svg:y="1.2854in" svg:width="6.6909in" svg:height="7.0209in" draw:z-index="0"><draw:image xlink:href="Pictures/10000001000003A3000003D1E312E99D.png" xlink:type="simple" xlink:show="embed" xlink:actuate="onLoad" draw:mime-type="image/png"/></draw:frame><draw:frame draw:style-name="fr1" draw:name="Image2" text:anchor-type="char" svg:x="0in" svg:y="0.0429in" svg:width="6.6929in" svg:height="1.2429in" draw:z-index="1"><draw:image xlink:href="Pictures/10000001000003A3000000ADD08CE414.png" xlink:type="simple" xlink:show="embed" xlink:actuate="onLoad" draw:mime-type="image/png"/></draw:frame></text:p>
      <text:p text:style-name="P3">More popular websites (websites I assume have more visitors), have more addresses. <text:span text:style-name="T1">For example:</text:span></text:p>
      <text:p text:style-name="P3">- <text:span text:style-name="T1">oxford has 2</text:span></text:p>
      <text:p text:style-name="P3">- <text:span text:style-name="T1">stanford has 7</text:span></text:p>
      <text:p text:style-name="P3">- <text:span text:style-name="T1">google has 16</text:span></text:p>
      <text:p text:style-name="P3"/>
      <text:p text:style-name="P4"><text:soft-page-break/>2.</text:p>
      <text:p text:style-name="P4">for oxford we get a <text:span text:style-name="T2">DNS </text:span>server <text:span text:style-name="T2">address (server: ), and then a server ip and port, denote by the #53.</text:span></text:p>
      <text:p text:style-name="P5">we also get the non-authoritative answer which shows the hostname that was queried and the IPv4 address that it resolves to.</text:p>
      <text:p text:style-name="P5"/>
      <text:p text:style-name="P5">The non-authoritative answer is a cached response, not from the authoritative server itself.</text:p>
      <text:p text:style-name="P5"/>
      <text:p text:style-name="P5">3.</text:p>
      <text:p text:style-name="P5">We get ‘server cannot find ox.ac.uk: REFUSED’. On further looking with debug, we get</text:p>
      <text:p text:style-name="P5"><draw:frame draw:style-name="fr1" draw:name="Image3" text:anchor-type="char" svg:x="0in" svg:y="0.0134in" svg:width="6.6929in" svg:height="1.5165in" draw:z-index="2"><draw:image xlink:href="Pictures/10000001000003A3000000D3E75DC7F2.png" xlink:type="simple" xlink:show="embed" xlink:actuate="onLoad" draw:mime-type="image/png"/></draw:frame></text:p>
      <text:p text:style-name="P5">-norec tells the DNS server not to recursively resolve the host for me, it tells it to just return what it knows from the cache or zone files.</text:p>
      <text:p text:style-name="P5"/>
      <text:p text:style-name="P5">- debug shows the raw DNS protocol packets, question sections, answer sections etc…</text:p>
      <text:p text:style-name="P5"/>
      <text:p text:style-name="P5">using the norec flag causes the DNS server to refuse the request as much public servers only answer recursive queries. The reason for this is due to 3 main points: security, rate limiting or access control. <text:span text:style-name="T3">The security reason is that non-recursive queries are often associated with DDoS probing – malicious and should be blocked</text:span></text:p>
      <text:p text:style-name="P5"/>
      <text:p text:style-name="P6">4.</text:p>
      <text:p text:style-name="P6">for 8.8.8.8 we get the exact same output as we did with ox.ac.uk</text:p>
      <text:p text:style-name="P6">for 208.67.222.222 we also get the same output, but it now says that the server cannot find the address in addr.arpa – a new output not seen before</text:p>
      <text:p text:style-name="P6"/>
      <text:p text:style-name="P6">5. if we try to lookup an address that does not exist, we get server cannot find [address]: NXDOMAN.</text:p>
      <text:p text:style-name="P6"/>
      <text:p text:style-name="P6">6.</text:p>
      <text:p text:style-name="P6">If we turn the no-rec flag off (remove it), the reverse resolving works and we find the DNS names of the hosts, ie:</text:p>
      <text:p text:style-name="P6">8.8.8.8 maps to google</text:p>
      <text:p text:style-name="P6">208.67.222.222 maps to a number of names:</text:p>
      <text:p text:style-name="P6">- dns.umbrella.com</text:p>
      <text:p text:style-name="P6">- dns.see.cisco.com</text:p>
      <text:p text:style-name="P6">- dns.opendns.com</text:p>
      <text:p text:style-name="P6">- solver1.opendns.com</text:p>
      <text:p text:style-name="P6"/>
      <text:p text:style-name="P6">this is the reverse lookup in action. The google ip address cleanly mapped to google, but the opendns one returned a few more names than just opendns. This reference to multiple internal hostnames is because OpenDNS is owned by cisco, umbrella is cisco’s DNS security/filtering service. These hostnames all represent different backend resolver nodes and services, and all point ot he opendns ID, so get caught in the nslookup.</text:p>
      <text:p text:style-name="P6"/>
      <text:p text:style-name="P7"><text:soft-page-break/>This does not happen with google as google likely hides internal infrastructure and does not expose backend root names.</text:p>
      <text:p text:style-name="P7"/>
      <text:p text:style-name="P2">DYN DNS Fail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12:46:16.081930043</meta:creation-date>
    <dc:date>2026-06-11T14:38:56.233383684</dc:date>
    <meta:editing-duration>PT1H29M18S</meta:editing-duration>
    <meta:editing-cycles>4</meta:editing-cycles>
    <meta:generator>LibreOffice/24.2.7.2$Linux_X86_64 LibreOffice_project/420$Build-2</meta:generator>
    <meta:document-statistic meta:table-count="0" meta:image-count="3" meta:object-count="0" meta:page-count="3" meta:paragraph-count="30" meta:word-count="391" meta:character-count="2252" meta:non-whitespace-character-count="1889"/>
  </office:meta>
</office:document-meta>
</file>