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dd1" officeooo:paragraph-rsid="0001f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12:46:16.081930043</meta:creation-date>
    <dc:date>2026-06-11T12:46:44.830948309</dc:date>
    <meta:editing-duration>PT2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