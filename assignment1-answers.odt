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A00000126DE34842A.png" manifest:media-type="image/png"/>
  <manifest:file-entry manifest:full-path="Pictures/100000010000039A000002F1222D13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ec0" officeooo:paragraph-rsid="000c7ec0"/>
    </style:style>
    <style:style style:name="P2" style:family="paragraph" style:parent-style-name="Standard">
      <style:text-properties fo:font-weight="bold" officeooo:rsid="000c7ec0" officeooo:paragraph-rsid="000c7ec0" style:font-weight-asian="bold" style:font-weight-complex="bold"/>
    </style:style>
    <style:style style:name="T1" style:family="text">
      <style:text-properties officeooo:rsid="000eb2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ic Timing</text:p>
      <text:p text:style-name="P1">1. using time and usr/bin/time to measure speed of matmul_slow.py</text:p>
      <text:p text:style-name="P1"><draw:frame draw:style-name="fr1" draw:name="Image1" text:anchor-type="char" svg:x="0in" svg:y="0.0063in" svg:width="6.6929in" svg:height="5.4661in" draw:z-index="0"><draw:image xlink:href="Pictures/100000010000039A000002F1222D13F3.png" xlink:type="simple" xlink:show="embed" xlink:actuate="onLoad" draw:mime-type="image/png"/></draw:frame></text:p>
      <text:p text:style-name="P1">We can s<text:span text:style-name="T1">ee</text:span> that sys time is the lowest, then user, then real being the slowest.</text:p>
      <text:p text:style-name="P1">These different metrics likely compare different speeds for different parts of the process.</text:p>
      <text:p text:style-name="P1">- System time likely corresponds purely to time on the cpu (ie. <text:span text:style-name="T1">time spent in the kernel</text:span>)</text:p>
      <text:p text:style-name="P1">- User time likely includes time for i/o, and external commands/ linking processes</text:p>
      <text:p text:style-name="P1">- Real time could even include UI and frontend time in the terminal <text:span text:style-name="T1">(Ie. full process - wall clock)</text:span></text:p>
      <text:p text:style-name="P1"/>
      <text:p text:style-name="P1">2.</text:p>
      <text:p text:style-name="P1"><draw:frame draw:style-name="fr1" draw:name="Image2" text:anchor-type="char" svg:x="0in" svg:y="0.0339in" svg:width="6.6929in" svg:height="2.1339in" draw:z-index="1"><draw:image xlink:href="Pictures/100000010000039A00000126DE34842A.png" xlink:type="simple" xlink:show="embed" xlink:actuate="onLoad" draw:mime-type="image/png"/></draw:frame></text:p>
      <text:p text:style-name="P1">You would likely <text:span text:style-name="T1">want to report the mean and standard deviation across many run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10:05:10.066968577</meta:creation-date>
    <meta:generator>LibreOffice/24.2.7.2$Linux_X86_64 LibreOffice_project/420$Build-2</meta:generator>
    <dc:date>2026-06-08T11:00:01.277936298</dc:date>
    <meta:editing-duration>PT10M49S</meta:editing-duration>
    <meta:editing-cycles>2</meta:editing-cycles>
    <meta:document-statistic meta:table-count="0" meta:image-count="2" meta:object-count="0" meta:page-count="1" meta:paragraph-count="9" meta:word-count="105" meta:character-count="600" meta:non-whitespace-character-count="504"/>
  </office:meta>
</office:document-meta>
</file>